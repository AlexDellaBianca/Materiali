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2545DB0935E75929365.png" manifest:media-type="image/png"/>
  <manifest:file-entry manifest:full-path="Pictures/10000000000001D300000322C65C6394B50C3D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822cm" svg:height="10cm" svg:x="4.8cm" svg:y="5cm">
          <draw:image xlink:href="Pictures/10000000000001D300000322C65C6394B50C3D5E.png" xlink:type="simple" xlink:show="embed" xlink:actuate="onLoad" loext:mime-type="image/png">
            <text:p/>
          </draw:image>
        </draw:frame>
        <draw:frame draw:style-name="gr1" draw:text-style-name="P1" draw:layer="layout" svg:width="6.969cm" svg:height="9.355cm" svg:x="12.831cm" svg:y="5.362cm">
          <draw:image xlink:href="Pictures/10000000000001BC000002545DB0935E75929365.png" xlink:type="simple" xlink:show="embed" xlink:actuate="onLoad" loext:mime-type="image/png">
            <text:p/>
          </draw:image>
        </draw:frame>
        <draw:frame draw:style-name="gr2" draw:text-style-name="P2" draw:layer="layout" svg:width="5.6cm" svg:height="0.962cm" svg:x="6cm" svg:y="3.838cm">
          <draw:text-box>
            <text:p>Array</text:p>
          </draw:text-box>
        </draw:frame>
        <draw:frame draw:style-name="gr2" draw:text-style-name="P2" draw:layer="layout" svg:width="5.6cm" svg:height="0.962cm" svg:x="13.431cm" svg:y="4cm">
          <draw:text-box>
            <text:p>Non Array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1T08:57:57.521385418</meta:creation-date>
    <dc:date>2025-03-11T08:59:47.051294405</dc:date>
    <meta:editing-duration>PT1M50S</meta:editing-duration>
    <meta:editing-cycles>1</meta:editing-cycles>
    <meta:document-statistic meta:object-count="27"/>
    <meta:generator>LibreOffice/6.4.7.2$Linux_X86_64 LibreOffice_project/40$Build-2</meta:generator>
  </office:meta>
</office:document-meta>
</file>